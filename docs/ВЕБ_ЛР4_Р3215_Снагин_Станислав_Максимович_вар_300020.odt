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3F7BA029B12.png" manifest:media-type="image/png"/>
  <manifest:file-entry manifest:full-path="Pictures/10000001000007800000039A3B6B10CE.png" manifest:media-type="image/png"/>
  <manifest:file-entry manifest:full-path="Pictures/1000000100000780000003F3C23F0913.png" manifest:media-type="image/png"/>
  <manifest:file-entry manifest:full-path="Pictures/1000000100000780000003F6C57047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535e76a"/>
    </style:style>
    <style:style style:name="P10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1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14" style:family="paragraph" style:parent-style-name="Heading_20_1">
      <style:paragraph-properties fo:break-before="page"/>
      <style:text-properties officeooo:rsid="02385c61"/>
    </style:style>
    <style:style style:name="P15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8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>
      <style:text-properties fo:font-weight="bold"/>
    </style:style>
    <style:style style:name="P26" style:family="paragraph" style:parent-style-name="Text_20_body">
      <style:text-properties fo:font-weight="bold" officeooo:paragraph-rsid="05402ebc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in" fo:margin-bottom="0in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in" fo:margin-bottom="0in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in" fo:margin-bottom="0in" style:contextual-spacing="false"/>
    </style:style>
    <style:style style:name="P33" style:family="paragraph" style:parent-style-name="Text_20_body" style:list-style-name="L7"/>
    <style:style style:name="P34" style:family="paragraph" style:parent-style-name="Text_20_body" style:list-style-name="L7">
      <style:paragraph-properties fo:margin-top="0in" fo:margin-bottom="0in" style:contextual-spacing="false"/>
    </style:style>
    <style:style style:name="P35" style:family="paragraph" style:parent-style-name="Text_20_body" style:list-style-name="L8"/>
    <style:style style:name="P36" style:family="paragraph" style:parent-style-name="Text_20_body" style:list-style-name="L8">
      <style:paragraph-properties fo:margin-top="0in" fo:margin-bottom="0in" style:contextual-spacing="false"/>
    </style:style>
    <style:style style:name="P37" style:family="paragraph" style:parent-style-name="Text_20_body">
      <style:text-properties fo:font-weight="normal" officeooo:paragraph-rsid="05402ebc" style:font-weight-asian="normal" style:font-weight-complex="normal"/>
    </style:style>
    <style:style style:name="P38" style:family="paragraph" style:parent-style-name="Text_20_body">
      <style:text-properties officeooo:paragraph-rsid="0535e76a"/>
    </style:style>
    <style:style style:name="P39" style:family="paragraph" style:parent-style-name="Text_20_body">
      <style:paragraph-properties fo:break-before="page"/>
      <style:text-properties officeooo:paragraph-rsid="0535e76a"/>
    </style:style>
    <style:style style:name="P40" style:family="paragraph" style:parent-style-name="Text_20_body">
      <style:text-properties fo:language="ru" fo:country="RU" officeooo:rsid="0535e76a" officeooo:paragraph-rsid="05424f58"/>
    </style:style>
    <style:style style:name="P41" style:family="paragraph" style:parent-style-name="Text_20_body">
      <style:text-properties fo:language="ru" fo:country="RU" officeooo:rsid="05424f58" officeooo:paragraph-rsid="05424f58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530e0a8"/>
    </style:style>
    <style:style style:name="T6" style:family="text">
      <style:text-properties fo:language="en" fo:country="US" officeooo:rsid="0537cbbc"/>
    </style:style>
    <style:style style:name="T7" style:family="text">
      <style:text-properties fo:language="en" fo:country="US" officeooo:rsid="0539b258"/>
    </style:style>
    <style:style style:name="T8" style:family="text">
      <style:text-properties fo:language="en" fo:country="US" officeooo:rsid="0535e76a"/>
    </style:style>
    <style:style style:name="T9" style:family="text">
      <style:text-properties fo:language="en" fo:country="US" officeooo:rsid="053a30be"/>
    </style:style>
    <style:style style:name="T10" style:family="text">
      <style:text-properties fo:language="en" fo:country="US" officeooo:rsid="0540e1e9"/>
    </style:style>
    <style:style style:name="T11" style:family="text">
      <style:text-properties fo:language="en" fo:country="US" officeooo:rsid="054358e4"/>
    </style:style>
    <style:style style:name="T12" style:family="text">
      <style:text-properties officeooo:rsid="05208c2e"/>
    </style:style>
    <style:style style:name="T13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14" style:family="text">
      <style:text-properties fo:font-size="12pt" fo:language="ru" fo:country="RU" fo:font-weight="normal" officeooo:rsid="05208c2e" style:font-size-asian="12pt" style:font-weight-asian="normal" style:font-size-complex="12pt" style:font-weight-complex="normal"/>
    </style:style>
    <style:style style:name="T15" style:family="text">
      <style:text-properties officeooo:rsid="03c1e56b"/>
    </style:style>
    <style:style style:name="T16" style:family="text">
      <style:text-properties fo:language="ru" fo:country="RU" officeooo:rsid="0535e76a"/>
    </style:style>
    <style:style style:name="T17" style:family="text">
      <style:text-properties fo:color="#bcbec4" loext:opacity="100%" style:font-name="JetBrains Mono1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cf8e6d" loext:opacity="100%" style:font-name="JetBrains Mono1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c77dbb" loext:opacity="100%" style:font-name="JetBrains Mono1" fo:font-size="11.5pt" fo:font-style="italic" fo:font-weight="normal" style:font-size-asian="11.5pt" style:font-style-asian="italic" style:font-weight-asian="normal"/>
    </style:style>
    <style:style style:name="T22" style:family="text">
      <style:text-properties fo:color="#6aab73" loext:opacity="100%" style:font-name="JetBrains Mono1" fo:font-size="11.5pt" fo:font-style="normal" fo:font-weight="normal" fo:background-color="#293c40" loext:char-shading-value="0" style:font-size-asian="11.5pt" style:font-style-asian="normal" style:font-weight-asian="normal"/>
    </style:style>
    <style:style style:name="T23" style:family="text">
      <style:text-properties fo:color="#6aab73" loext:opacity="100%" style:font-name="JetBrains Mono1" fo:font-size="11.5pt" fo:font-style="normal" fo:font-weight="normal" style:font-size-asian="11.5pt" style:font-style-asian="normal" style:font-weight-asian="normal"/>
    </style:style>
    <style:style style:name="T24" style:family="text">
      <style:text-properties officeooo:rsid="05424f5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/text:p>
      <text:p text:style-name="P18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16" loext:marker-style-name="T1"><text:span text:style-name="T1">Факультет Программной Инженерии и Компьютерной Техники </text:span></text:p>
      <text:p text:style-name="P4">Лабораторная работа<text:span text:style-name="T4"> </text:span><text:span text:style-name="T5">№</text:span><text:span text:style-name="T10">4</text:span><text:span text:style-name="T4"> </text:span>по дисциплине <text:span text:style-name="T12">Веб-программирование</text:span></text:p>
      <text:p text:style-name="P17">Вариант <text:span text:style-name="T7">300020</text:span></text:p>
      <text:p text:style-name="P5">Выполнил: Снагин Станислав Максимович</text:p>
      <text:p text:style-name="P7"><text:span text:style-name="T13">Проверил: </text:span><text:span text:style-name="T14">Кулинич Ярослав Вадимович</text:span></text:p>
      <text:p text:style-name="P6">Группа: Р3<text:span text:style-name="T12">2</text:span>15</text:p>
      <text:p text:style-name="P3">Санкт Петербург 202<text:span text:style-name="T1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8"><text:a xlink:type="simple" xlink:href="#__RefHeading___Toc152_2376174330" text:style-name="Index_20_Link" text:visited-style-name="Index_20_Link">Задание<text:tab/>3</text:a></text:p>
          <text:p text:style-name="P8"><text:a xlink:type="simple" xlink:href="#__RefHeading___Toc2108_4178638284" text:style-name="Index_20_Link" text:visited-style-name="Index_20_Link">Ход работы<text:tab/>5</text:a></text:p>
        </text:index-body>
      </text:table-of-content>
      <text:h text:style-name="P10" text:outline-level="1"/>
      <text:h text:style-name="P13" text:outline-level="1"><text:bookmark-start text:name="__RefHeading___Toc152_2376174330"/>Задание<text:bookmark-end text:name="__RefHeading___Toc152_2376174330"/></text:h>
      <text:p text:style-name="Text_20_body">Переписать приложение из предыдущей лабораторной работы с использованием следующих технологий:</text:p>
      <text:list text:style-name="L4">
        <text:list-item>
          <text:p text:style-name="P28">Уровень back-end должен быть основан на Java EE (необходимо использовать EJB). </text:p>
        </text:list-item>
        <text:list-item>
          <text:p text:style-name="P28">Уровень front-end должен быть построен на React + Redux (необходимо использовать ES6 и JSX) с использованием набора компонентов PrimeReact </text:p>
        </text:list-item>
        <text:list-item>
          <text:p text:style-name="P27">Взаимодействие между уровнями back-end и front-end должно быть организовано посредством REST API. </text:p>
        </text:list-item>
      </text:list>
      <text:p text:style-name="Text_20_body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<text:list text:style-name="L5">
        <text:list-item>
          <text:p text:style-name="P30">"Десктопный" - для устройств, ширина экрана которых равна или превышает 1193 пикселей. </text:p>
        </text:list-item>
        <text:list-item>
          <text:p text:style-name="P30">"Планшетный" - для устройств, ширина экрана которых равна или превышает 829, но меньше 1193 пикселей. </text:p>
        </text:list-item>
        <text:list-item>
          <text:p text:style-name="P29">"Мобильный"- для устройств, ширина экрана которых меньше 829 пикселей. </text:p>
        </text:list-item>
      </text:list>
      <text:p text:style-name="Text_20_body">Стартовая страница должна содержать следующие элементы:</text:p>
      <text:list text:style-name="L6">
        <text:list-item>
          <text:p text:style-name="P32">"Шапку", содержащую ФИО студента, номер группы и номер варианта. </text:p>
        </text:list-item>
        <text:list-item>
          <text:p text:style-name="P31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 </text:p>
        </text:list-item>
      </text:list>
      <text:p text:style-name="Text_20_body">Основная страница приложения должна содержать следующие элементы:</text:p>
      <text:list text:style-name="L7">
        <text:list-item>
          <text:p text:style-name="P34">Набор полей ввода для задания координат точки и радиуса области в соответствии с вариантом задания: Dropdown {'-2','-1.5','-1','-0.5','0','0.5','1','1.5','2'} для координаты по оси X, Slider (-3 ... 5) для координаты по оси Y, и Dropdown {'-2','-1.5','-1','-0.5','0','0.5','1','1.5','2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 </text:p>
        </text:list-item>
        <text:list-item>
          <text:p text:style-name="P34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 </text:p>
        </text:list-item>
        <text:list-item>
          <text:p text:style-name="P34">Таблицу со списком результатов предыдущих проверок. </text:p>
        </text:list-item>
        <text:list-item>
          <text:p text:style-name="P33"><text:soft-page-break/>Ссылку, по которой аутентифицированный пользователь может закрыть свою сессию и вернуться на стартовую страницу приложения. </text:p>
        </text:list-item>
      </text:list>
      <text:p text:style-name="Text_20_body">Дополнительные требования к приложению:</text:p>
      <text:list text:style-name="L8">
        <text:list-item>
          <text:p text:style-name="P36">Все результаты проверки должны сохраняться в базе данных под управлением СУБД PostgreSQL. </text:p>
        </text:list-item>
        <text:list-item>
          <text:p text:style-name="P35">Для доступа к БД необходимо использовать JPA. </text:p>
        </text:list-item>
      </text:list>
      <text:p text:style-name="Text_20_body"/>
      <text:section text:style-name="Sect2" text:name="_iapsportletlab8_WAR_iapsportlet_imageBlock">
        <text:p text:style-name="P2"/>
      </text:section>
      <text:p text:style-name="P26">Дополнительное задание:</text:p>
      <text:p text:style-name="P37">+ Реализовать возможность просматривать точки других пользователей. В таблице должны рисоваться все точки в системе, с доп колонкой username. При клике правой кнопкой на строку - должно выпадать контекстное меню с возможностью удалить только свои точки. Веб должен в рантайме получать информацию о новых точках от других пользователей. Сделать это необходимо через websockets.</text:p>
      <text:p text:style-name="P37">+ Адаптив на основной странице</text:p>
      <text:p text:style-name="P37">+ Регистрация</text:p>
      <text:p text:style-name="P37">+ Оптимистичная отрисовка - координаты знаете до отправки, сначала рисуете, потом отправляете запрос</text:p>
      <text:p text:style-name="P37">+ При отправке через форму рисовать актуальные точки на графике</text:p>
      <text:h text:style-name="P14" text:outline-level="1" text:is-list-header="true"><text:bookmark-start text:name="__RefHeading___Toc2108_4178638284"/>Ход работы<text:bookmark-end text:name="__RefHeading___Toc2108_4178638284"/></text:h>
      <text:p text:style-name="P40">Исходный код доступен на <text:span text:style-name="T4">github: </text:span></text:p>
      <text:p text:style-name="P40"><text:span text:style-name="T24">front-end</text:span> <text:a xlink:type="simple" xlink:href="https://github.com/ssnagin/web-sem3-lab4-frontend/" text:style-name="Internet_20_link" text:visited-style-name="Visited_20_Internet_20_Link"><text:span text:style-name="T9">https://github.com/ssnagin/web-sem3-lab4-frontend/</text:span></text:a></text:p>
      <text:p text:style-name="P41"><text:span text:style-name="T9">b</text:span><text:span text:style-name="T4">ack-end </text:span><text:a xlink:type="simple" xlink:href="https://github.com/ssnagin/web-sem3-lab4-backend/" text:style-name="Internet_20_link" text:visited-style-name="Visited_20_Internet_20_Link"><text:span text:style-name="T4">https://github.com/ssnagin/web-sem3-lab4-backend/</text:span></text:a></text:p>
      <text:p text:style-name="P9"><text:a xlink:type="simple" xlink:href="https://ssnagin.github.io/web-sem3-lab4-frontend/#/" text:style-name="Internet_20_link" text:visited-style-name="Visited_20_Internet_20_Link"><text:span text:style-name="T8">https://ssnagin.github.io/web-sem3-lab4-frontend/#/</text:span></text:a><text:span text:style-name="T8"> - </text:span><text:span text:style-name="T16">если на момент будет работать</text:span></text:p>
      <text:p text:style-name="P9"><draw:frame draw:style-name="fr1" draw:name="Изображение1" text:anchor-type="char" svg:width="6.4953in" svg:height="3.4319in" draw:z-index="0"><draw:image xlink:href="Pictures/1000000100000780000003F6C57047B1.png" xlink:type="simple" xlink:show="embed" xlink:actuate="onLoad" draw:mime-type="image/png"/></draw:frame><text:span text:style-name="T16"><text:line-break/></text:span></text:p>
      <text:p text:style-name="P9"><draw:frame draw:style-name="fr1" draw:name="Изображение5" text:anchor-type="char" svg:width="6.4953in" svg:height="3.1165in" draw:z-index="1"><draw:image xlink:href="Pictures/10000001000007800000039A3B6B10CE.png" xlink:type="simple" xlink:show="embed" xlink:actuate="onLoad" draw:mime-type="image/png"/></draw:frame><text:span text:style-name="T16"/></text:p>
      <text:p text:style-name="P39"><draw:frame draw:style-name="fr1" draw:name="Изображение6" text:anchor-type="char" svg:width="6.4953in" svg:height="3.4346in" draw:z-index="3"><draw:image xlink:href="Pictures/100000010000077F000003F7BA029B12.png" xlink:type="simple" xlink:show="embed" xlink:actuate="onLoad" draw:mime-type="image/png"/></draw:frame><text:span text:style-name="T16"/></text:p>
      <text:p text:style-name="P39"><draw:frame draw:style-name="fr1" draw:name="Изображение3" text:anchor-type="char" svg:width="6.4953in" svg:height="3.4189in" draw:z-index="2"><draw:image xlink:href="Pictures/1000000100000780000003F3C23F0913.png" xlink:type="simple" xlink:show="embed" xlink:actuate="onLoad" draw:mime-type="image/png"/></draw:frame><text:span text:style-name="T16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Обычный_20_текст" style:display-name="Обычный текст" style:family="paragraph" style:parent-style-name="Heading_20_2">
      <style:paragraph-properties fo:text-align="start" style:justify-single-word="false">
        <style:tab-stops/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6-01-12T21:07:07.047848711</dc:date>
    <meta:editing-duration>P7DT12H13M27S</meta:editing-duration>
    <meta:editing-cycles>991</meta:editing-cycles>
    <meta:print-date>2024-09-11T19:48:02.397916277</meta:print-date>
    <meta:printed-by>PDF files</meta:printed-by>
    <meta:document-statistic meta:table-count="0" meta:image-count="4" meta:object-count="0" meta:page-count="7" meta:paragraph-count="46" meta:word-count="499" meta:character-count="3882" meta:non-whitespace-character-count="3421"/>
  </office:meta>
</office:document-meta>
</file>